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6.51cm" fo:margin-left="-0.191cm" fo:margin-top="0cm" fo:margin-bottom="0cm" table:align="left"/>
    </style:style>
    <style:style style:name="Tabla1.A" style:family="table-column">
      <style:table-column-properties style:column-width="8.255cm"/>
    </style:style>
    <style:style style:name="Tabla1.B" style:family="table-column">
      <style:table-column-properties style:column-width="4.128cm"/>
    </style:style>
    <style:style style:name="Tabla1.1" style:family="table-row">
      <style:table-row-properties style:keep-together="true" fo:keep-together="auto"/>
    </style:style>
    <style:style style:name="Tabla1.A1" style:family="table-cell">
      <style:table-cell-properties fo:background-color="#1e40af" fo:padding-left="0.191cm" fo:padding-right="0.191cm" fo:padding-top="0cm" fo:padding-bottom="0cm" fo:border="0.002cm solid #cccccc">
        <style:background-image/>
      </style:table-cell-properties>
    </style:style>
    <style:style style:name="Tabla1.A2" style:family="table-cell">
      <style:table-cell-properties fo:background-color="#f8fafc" fo:padding-left="0.191cm" fo:padding-right="0.191cm" fo:padding-top="0cm" fo:padding-bottom="0cm" fo:border="0.002cm solid #cccccc">
        <style:background-image/>
      </style:table-cell-properties>
    </style:style>
    <style:style style:name="Tabla1.A3" style:family="table-cell">
      <style:table-cell-properties fo:background-color="#ffffff" fo:padding-left="0.191cm" fo:padding-right="0.191cm" fo:padding-top="0cm" fo:padding-bottom="0cm" fo:border="0.002cm solid #cccccc">
        <style:background-image/>
      </style:table-cell-properties>
    </style:style>
    <style:style style:name="Tabla2" style:family="table">
      <style:table-properties style:width="16.51cm" fo:margin-left="-0.191cm" fo:margin-top="0cm" fo:margin-bottom="0cm" table:align="left"/>
    </style:style>
    <style:style style:name="Tabla2.A" style:family="table-column">
      <style:table-column-properties style:column-width="4.937cm"/>
    </style:style>
    <style:style style:name="Tabla2.B" style:family="table-column">
      <style:table-column-properties style:column-width="5.786cm"/>
    </style:style>
    <style:style style:name="Tabla2.C" style:family="table-column">
      <style:table-column-properties style:column-width="5.787cm"/>
    </style:style>
    <style:style style:name="Tabla2.1" style:family="table-row">
      <style:table-row-properties style:keep-together="true" fo:keep-together="auto"/>
    </style:style>
    <style:style style:name="Tabla2.A1" style:family="table-cell">
      <style:table-cell-properties fo:background-color="#991b1b" fo:padding-left="0.191cm" fo:padding-right="0.191cm" fo:padding-top="0cm" fo:padding-bottom="0cm" fo:border="0.002cm solid #cccccc">
        <style:background-image/>
      </style:table-cell-properties>
    </style:style>
    <style:style style:name="Tabla2.A2" style:family="table-cell">
      <style:table-cell-properties fo:background-color="#fef2f2" fo:padding-left="0.191cm" fo:padding-right="0.191cm" fo:padding-top="0cm" fo:padding-bottom="0cm" fo:border="0.002cm solid #cccccc">
        <style:background-image/>
      </style:table-cell-properties>
    </style:style>
    <style:style style:name="Tabla2.A3" style:family="table-cell">
      <style:table-cell-properties fo:background-color="#fff5f5" fo:padding-left="0.191cm" fo:padding-right="0.191cm" fo:padding-top="0cm" fo:padding-bottom="0cm" fo:border="0.002cm solid #cccccc">
        <style:background-image/>
      </style:table-cell-properties>
    </style:style>
    <style:style style:name="Tabla3" style:family="table">
      <style:table-properties style:width="16.51cm" fo:margin-left="-0.191cm" fo:margin-top="0cm" fo:margin-bottom="0cm" table:align="left"/>
    </style:style>
    <style:style style:name="Tabla3.A" style:family="table-column">
      <style:table-column-properties style:column-width="6.172cm"/>
    </style:style>
    <style:style style:name="Tabla3.B" style:family="table-column">
      <style:table-column-properties style:column-width="10.338cm"/>
    </style:style>
    <style:style style:name="Tabla3.1" style:family="table-row">
      <style:table-row-properties style:keep-together="true" fo:keep-together="auto"/>
    </style:style>
    <style:style style:name="Tabla3.A1" style:family="table-cell">
      <style:table-cell-properties fo:background-color="#1e40af" fo:padding-left="0.191cm" fo:padding-right="0.191cm" fo:padding-top="0cm" fo:padding-bottom="0cm" fo:border="0.002cm solid #cccccc">
        <style:background-image/>
      </style:table-cell-properties>
    </style:style>
    <style:style style:name="Tabla3.A2" style:family="table-cell">
      <style:table-cell-properties fo:background-color="#f0f9ff" fo:padding-left="0.191cm" fo:padding-right="0.191cm" fo:padding-top="0cm" fo:padding-bottom="0cm" fo:border="0.002cm solid #cccccc">
        <style:background-image/>
      </style:table-cell-properties>
    </style:style>
    <style:style style:name="Tabla3.A3" style:family="table-cell">
      <style:table-cell-properties fo:background-color="#ffffff" fo:padding-left="0.191cm" fo:padding-right="0.191cm" fo:padding-top="0cm" fo:padding-bottom="0cm" fo:border="0.002cm solid #cccccc">
        <style:background-image/>
      </style:table-cell-properties>
    </style:style>
    <style:style style:name="P1" style:family="paragraph" style:parent-style-name="Standard">
      <style:paragraph-properties fo:margin-left="0.635cm" fo:margin-right="0cm" fo:margin-top="0.353cm" fo:margin-bottom="0.353cm" fo:text-indent="0cm" style:auto-text-indent="false"/>
    </style:style>
    <style:style style:name="P2" style:family="paragraph" style:parent-style-name="Standard">
      <style:paragraph-properties fo:margin-top="0cm" fo:margin-bottom="0.282cm"/>
    </style:style>
    <style:style style:name="P3" style:family="paragraph" style:parent-style-name="Standard" style:master-page-name="Standard">
      <style:paragraph-properties fo:margin-top="2.117cm" fo:margin-bottom="0.353cm" fo:text-align="center" style:justify-single-word="false" style:page-number="auto"/>
      <style:text-properties fo:color="#1e40af" style:font-name="Arial" fo:font-size="18pt" fo:font-weight="bold" style:font-name-asian="Arial2" style:font-size-asian="18pt" style:font-weight-asian="bold" style:font-name-complex="Arial2" style:font-size-complex="18pt" style:font-weight-complex="bold"/>
    </style:style>
    <style:style style:name="P4" style:family="paragraph" style:parent-style-name="Standard">
      <style:paragraph-properties fo:margin-top="0cm" fo:margin-bottom="0.212cm" fo:text-align="center" style:justify-single-word="false"/>
      <style:text-properties style:font-name="Arial" fo:font-size="14pt" fo:font-weight="bold" style:font-name-asian="Arial2" style:font-size-asian="14pt" style:font-weight-asian="bold" style:font-name-complex="Arial2" style:font-size-complex="14pt" style:font-weight-complex="bold"/>
    </style:style>
    <style:style style:name="P5" style:family="paragraph" style:parent-style-name="Standard">
      <style:paragraph-properties fo:margin-top="0cm" fo:margin-bottom="0.212cm" fo:text-align="center" style:justify-single-word="false"/>
      <style:text-properties fo:color="#475569" style:font-name="Arial" fo:font-size="11pt" style:font-name-asian="Arial2" style:font-size-asian="11pt" style:font-name-complex="Arial2" style:font-size-complex="11pt"/>
    </style:style>
    <style:style style:name="P6" style:family="paragraph" style:parent-style-name="Standard">
      <style:paragraph-properties fo:margin-top="0cm" fo:margin-bottom="1.058cm" fo:text-align="center" style:justify-single-word="false"/>
      <style:text-properties fo:color="#0f766e" style:font-name="Arial" fo:font-size="11pt" fo:font-style="italic" style:font-name-asian="Arial2" style:font-size-asian="11pt" style:font-style-asian="italic" style:font-name-complex="Arial2" style:font-size-complex="11pt" style:font-style-complex="italic"/>
    </style:style>
    <style:style style:name="P7" style:family="paragraph" style:parent-style-name="Standard">
      <style:text-properties fo:color="#ffffff" fo:font-size="10pt" fo:font-weight="bold" style:font-size-asian="10pt" style:font-weight-asian="bold" style:font-size-complex="10pt" style:font-weight-complex="bold"/>
    </style:style>
    <style:style style:name="P8" style:family="paragraph" style:parent-style-name="Standard">
      <style:text-properties style:font-name="Arial" fo:font-size="10pt" style:font-name-asian="Arial2" style:font-size-asian="10pt" style:font-name-complex="Arial2" style:font-size-complex="10pt"/>
    </style:style>
    <style:style style:name="P9" style:family="paragraph" style:parent-style-name="Standard">
      <style:paragraph-properties fo:margin-top="0.494cm" fo:margin-bottom="0.212cm" fo:text-align="center" style:justify-single-word="false" fo:break-before="page" fo:padding-left="0cm" fo:padding-right="0cm" fo:padding-top="0.282cm" fo:padding-bottom="0cm" fo:border-left="none" fo:border-right="none" fo:border-top="0.026cm solid #3b82f6" fo:border-bottom="none"/>
      <style:text-properties fo:color="#94a3b8" style:font-name="Arial" fo:font-size="10pt" fo:font-weight="bold" style:font-name-asian="Arial2" style:font-size-asian="10pt" style:font-weight-asian="bold" style:font-name-complex="Arial2" style:font-size-complex="10pt" style:font-weight-complex="bold"/>
    </style:style>
    <style:style style:name="P10" style:family="paragraph" style:parent-style-name="Standard">
      <style:paragraph-properties fo:margin-top="0cm" fo:margin-bottom="0.141cm"/>
      <style:text-properties fo:color="#0f766e" style:font-name="Arial" fo:font-size="9pt" fo:font-weight="bold" style:font-name-asian="Arial2" style:font-size-asian="9pt" style:font-weight-asian="bold" style:font-name-complex="Arial2" style:font-size-complex="9pt" style:font-weight-complex="bold"/>
    </style:style>
    <style:style style:name="P11" style:family="paragraph" style:parent-style-name="Standard">
      <style:paragraph-properties fo:margin-left="0cm" fo:margin-right="0cm" fo:margin-top="0cm" fo:margin-bottom="0.247cm" fo:text-indent="0cm" style:auto-text-indent="false"/>
      <style:text-properties style:font-name="Arial" fo:font-size="11pt" style:font-name-asian="Arial2" style:font-size-asian="11pt" style:font-name-complex="Arial2" style:font-size-complex="11pt"/>
    </style:style>
    <style:style style:name="P12" style:family="paragraph" style:parent-style-name="Standard">
      <style:paragraph-properties fo:margin-left="0.847cm" fo:margin-right="0cm" fo:margin-top="0cm" fo:margin-bottom="0.141cm" fo:text-indent="0cm" style:auto-text-indent="false"/>
      <style:text-properties fo:color="#64748b" style:font-name="Arial" fo:font-size="10pt" fo:font-style="italic" style:font-name-asian="Arial2" style:font-size-asian="10pt" style:font-style-asian="italic" style:font-name-complex="Arial2" style:font-size-complex="10pt" style:font-style-complex="italic"/>
    </style:style>
    <style:style style:name="P13" style:family="paragraph" style:parent-style-name="Standard">
      <style:paragraph-properties fo:margin-left="0.635cm" fo:margin-right="0cm" fo:margin-top="0cm" fo:margin-bottom="0.141cm" fo:text-indent="0cm" style:auto-text-indent="false"/>
      <style:text-properties fo:color="#166534" style:font-name="Arial" fo:font-size="11pt" style:font-name-asian="Arial2" style:font-size-asian="11pt" style:font-name-complex="Arial2" style:font-size-complex="11pt"/>
    </style:style>
    <style:style style:name="P14" style:family="paragraph" style:parent-style-name="Standard">
      <style:paragraph-properties fo:margin-top="0.282cm" fo:margin-bottom="0.106cm"/>
      <style:text-properties fo:color="#1e40af" style:font-name="Arial" fo:font-size="11pt" fo:font-weight="bold" style:font-name-asian="Arial2" style:font-size-asian="11pt" style:font-weight-asian="bold" style:font-name-complex="Arial2" style:font-size-complex="11pt" style:font-weight-complex="bold"/>
    </style:style>
    <style:style style:name="P15" style:family="paragraph" style:parent-style-name="Standard">
      <style:paragraph-properties fo:margin-top="0.706cm" fo:margin-bottom="0cm"/>
      <style:text-properties fo:color="#166534" style:font-name="Arial" fo:font-size="11pt" fo:font-weight="bold" style:font-name-asian="Arial2" style:font-size-asian="11pt" style:font-weight-asian="bold" style:font-name-complex="Arial2" style:font-size-complex="11pt" style:font-weight-complex="bold"/>
    </style:style>
    <style:style style:name="P16" style:family="paragraph" style:parent-style-name="Heading_20_2">
      <style:paragraph-properties fo:margin-top="0.353cm" fo:margin-bottom="0.141cm"/>
      <style:text-properties fo:color="#475569" style:font-name="Arial" fo:font-size="12pt" fo:font-weight="bold" style:font-name-asian="Arial2" style:font-size-asian="12pt" style:font-weight-asian="bold" style:font-name-complex="Arial2" style:font-size-complex="12pt" style:font-weight-complex="bold"/>
    </style:style>
    <style:style style:name="P17" style:family="paragraph" style:parent-style-name="Heading_20_1">
      <style:paragraph-properties fo:margin-top="0.564cm" fo:margin-bottom="0.212cm"/>
      <style:text-properties fo:color="#1e40af" style:font-name="Arial" fo:font-size="14pt" fo:font-weight="bold" style:font-name-asian="Arial2" style:font-size-asian="14pt" style:font-weight-asian="bold" style:font-name-complex="Arial2" style:font-size-complex="14pt" style:font-weight-complex="bold"/>
    </style:style>
    <style:style style:name="T1" style:family="text">
      <style:text-properties fo:color="#1e40af" style:font-name="Arial" fo:font-size="11pt" fo:font-weight="bold" style:font-name-asian="Arial2" style:font-size-asian="11pt" style:font-weight-asian="bold" style:font-name-complex="Arial2" style:font-size-complex="11pt" style:font-weight-complex="bold"/>
    </style:style>
    <style:style style:name="T2" style:family="text">
      <style:text-properties fo:color="#475569" style:font-name="Arial" fo:font-size="11pt" fo:font-style="italic" style:font-name-asian="Arial2" style:font-size-asian="11pt" style:font-style-asian="italic" style:font-name-complex="Arial2" style:font-size-complex="11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UIÓN DE PRESENTACIÓN</text:p>
      <text:p text:style-name="P4">Lichess Opening Trainer Pro</text:p>
      <text:p text:style-name="P5">Eneko Ostolozaga <text:s/>· <text:s/>Bootcamp Data Science e IA Generativa</text:p>
      <text:p text:style-name="P6">Duración total: ~12 minutos</text:p>
      <table:table table:name="Tabla1" table:style-name="Tabla1">
        <table:table-column table:style-name="Tabla1.A"/>
        <table:table-column table:style-name="Tabla1.B" table:number-columns-repeated="2"/>
        <table:table-row table:style-name="Tabla1.1">
          <table:table-cell table:style-name="Tabla1.A1" office:value-type="string">
            <text:p text:style-name="P7">Sección</text:p>
          </table:table-cell>
          <table:table-cell table:style-name="Tabla1.A1" office:value-type="string">
            <text:p text:style-name="P7">Soporte</text:p>
          </table:table-cell>
          <table:table-cell table:style-name="Tabla1.A1" office:value-type="string">
            <text:p text:style-name="P7">Tiempo</text:p>
          </table:table-cell>
        </table:table-row>
        <table:table-row table:style-name="Tabla1.1">
          <table:table-cell table:style-name="Tabla1.A2" office:value-type="string">
            <text:p text:style-name="P8">Presentación: Intro + problema</text:p>
          </table:table-cell>
          <table:table-cell table:style-name="Tabla1.A2" office:value-type="string">
            <text:p text:style-name="P8">Diapositiva 1-2</text:p>
          </table:table-cell>
          <table:table-cell table:style-name="Tabla1.A2" office:value-type="string">
            <text:p text:style-name="P8">~1 min 30 s</text:p>
          </table:table-cell>
        </table:table-row>
        <table:table-row table:style-name="Tabla1.1">
          <table:table-cell table:style-name="Tabla1.A3" office:value-type="string">
            <text:p text:style-name="P8">Presentación: Datos + preproceso</text:p>
          </table:table-cell>
          <table:table-cell table:style-name="Tabla1.A3" office:value-type="string">
            <text:p text:style-name="P8">Diapositiva 3-4</text:p>
          </table:table-cell>
          <table:table-cell table:style-name="Tabla1.A3" office:value-type="string">
            <text:p text:style-name="P8">~1 min 30 s</text:p>
          </table:table-cell>
        </table:table-row>
        <table:table-row table:style-name="Tabla1.1">
          <table:table-cell table:style-name="Tabla1.A2" office:value-type="string">
            <text:p text:style-name="P8">Presentación: Modelos ML</text:p>
          </table:table-cell>
          <table:table-cell table:style-name="Tabla1.A2" office:value-type="string">
            <text:p text:style-name="P8">Diapositiva 5-6</text:p>
          </table:table-cell>
          <table:table-cell table:style-name="Tabla1.A2" office:value-type="string">
            <text:p text:style-name="P8">~2 min</text:p>
          </table:table-cell>
        </table:table-row>
        <table:table-row table:style-name="Tabla1.1">
          <table:table-cell table:style-name="Tabla1.A3" office:value-type="string">
            <text:p text:style-name="P8">Presentación: Sistema recomendación</text:p>
          </table:table-cell>
          <table:table-cell table:style-name="Tabla1.A3" office:value-type="string">
            <text:p text:style-name="P8">Diapositiva 7</text:p>
          </table:table-cell>
          <table:table-cell table:style-name="Tabla1.A3" office:value-type="string">
            <text:p text:style-name="P8">~1 min</text:p>
          </table:table-cell>
        </table:table-row>
        <table:table-row table:style-name="Tabla1.1">
          <table:table-cell table:style-name="Tabla1.A2" office:value-type="string">
            <text:p text:style-name="P8">Demo en vivo: Streamlit</text:p>
          </table:table-cell>
          <table:table-cell table:style-name="Tabla1.A2" office:value-type="string">
            <text:p text:style-name="P8">App real</text:p>
          </table:table-cell>
          <table:table-cell table:style-name="Tabla1.A2" office:value-type="string">
            <text:p text:style-name="P8">~4 min</text:p>
          </table:table-cell>
        </table:table-row>
        <table:table-row table:style-name="Tabla1.1">
          <table:table-cell table:style-name="Tabla1.A3" office:value-type="string">
            <text:p text:style-name="P8">Presentación: Conclusiones</text:p>
          </table:table-cell>
          <table:table-cell table:style-name="Tabla1.A3" office:value-type="string">
            <text:p text:style-name="P8">Diapositiva 8</text:p>
          </table:table-cell>
          <table:table-cell table:style-name="Tabla1.A3" office:value-type="string">
            <text:p text:style-name="P8">~1 min</text:p>
          </table:table-cell>
        </table:table-row>
        <table:table-row table:style-name="Tabla1.1">
          <table:table-cell table:style-name="Tabla1.A2" office:value-type="string">
            <text:p text:style-name="P8">Preguntas / cierre</text:p>
          </table:table-cell>
          <table:table-cell table:style-name="Tabla1.A2" office:value-type="string">
            <text:p text:style-name="P8">—</text:p>
          </table:table-cell>
          <table:table-cell table:style-name="Tabla1.A2" office:value-type="string">
            <text:p text:style-name="P8">~1 min</text:p>
          </table:table-cell>
        </table:table-row>
      </table:table>
      <text:p text:style-name="Standard"/>
      <text:p text:style-name="P9">── BLOQUE 1 · INTRODUCCIÓN Y PROBLEMA ──</text:p>
      <text:p text:style-name="P10">⏱ <text:s/>~0:00 – 1:30 <text:s/>| <text:s/>Diapositivas 1-2</text:p>
      <text:h text:style-name="P17" text:outline-level="1">1. Apertura: enganchad al jurado desde el primer segundo</text:h>
      <text:h text:style-name="P16" text:outline-level="2">Lo que dices</text:h>
      <text:p text:style-name="P11">Buenas. Me llamo Eneko y durante las últimas semanas he estado construyendo algo que une dos cosas que me apasionan: el ajedrez y el dato. El proyecto se llama Lichess Opening Trainer Pro.</text:p>
      <text:p text:style-name="P11">El problema que resuelvo es muy concreto. Cualquier jugador de ajedrez online tiene cientos, a veces miles de partidas jugadas. Pero ¿cuántos saben con precisión qué aperturas dominan de verdad y cuáles son una trampa recurrente que les hace perder puntos?</text:p>
      <text:p text:style-name="P11">La respuesta habitual es: nadie. Porque analizarlo a mano es inviable, y las plataformas solo te dan estadísticas superficiales. Mi proyecto convierte esas partidas en un diagnóstico objetivo, accionable, y personalizado.</text:p>
      <text:h text:style-name="P16" text:outline-level="2">Qué señalar en la diapositiva</text:h>
      <text:p text:style-name="P12">📌 <text:s/>Slide 1: foto del tablero + título. No leas el título, proyéctalo en silencio 2 segundos.</text:p>
      <text:p text:style-name="P12">📌 <text:s/>Slide 2: el problema en una sola frase + tres puntos de dolor del jugador amateur.</text:p>
      <text:p text:style-name="Standard"/>
      <text:p text:style-name="P9">── BLOQUE 2 · DATOS Y PREPROCESO ──</text:p>
      <text:p text:style-name="P10">⏱ <text:s/>~1:30 – 3:00 <text:s/>| <text:s/>Diapositivas 3-4</text:p>
      <text:h text:style-name="P17" text:outline-level="1">2. Los datos: de dónde vienen y qué hay que hacerles</text:h>
      <text:h text:style-name="P16" text:outline-level="2">Lo que dices</text:h>
      <text:p text:style-name="P11">La primera fuente es la API pública de Lichess. Con una sola llamada puedo descargar hasta 500 partidas de cualquier usuario en formato PGN: resultado, apertura, rating, cada jugada. Todo gratis, sin scraping, con tasa de llamadas muy generosa.</text:p>
      <text:p text:style-name="P11">La segunda fuente es una base de datos teórica que construí a partir de libros y bases maestras: 327.000 posiciones EPD que representan la teoría de apertura conocida. Esto me permite saber con exactitud en qué jugada el usuario abandona la teoría. Ese número, que llamé Fin_Teoria, es uno de los ejes centrales del modelo.</text:p>
      <text:p text:style-name="P11">Y la tercera pieza es Stockfish, el motor de ajedrez más potente del mundo. Lo uso para evaluar las 12 jugadas propias del jugador posteriores a ese abandono de teoría. Calculo la pérdida media en centipeones, que luego convierto a un porcentaje de precisión con una fórmula exponencial.</text:p>
      <text:h text:style-name="P16" text:outline-level="2">Preproceso: qué hice con los datos</text:h>
      <text:p text:style-name="P11">Aquí viene el trabajo de ingeniería real. Los datos brutos tienen outliers severos: partidas donde el motor falla, FENs inválidos, partidas abandonadas en jugada 3. Aplicamos winsorización en el percentil 95 para el ACL —pérdida máxima capada a 500cp— y validación de FEN antes de cualquier análisis.</text:p>
      <text:p text:style-name="P11">Pero la parte más interesante fue el feature engineering. Creé tres variables derivadas que capturan algo que las métricas brutas no ven:</text:p>
      <text:p text:style-name="P13">▸ <text:s/>AccAjustada: penaliza la precisión cuando hay poca teoría. Porque jugar bien una posición que no conoces no es lo mismo que dominarla.</text:p>
      <text:p text:style-name="P13">▸ <text:s/>game_prep_score: producto de teoría y precisión. Mide si el jugador está bien preparado Y juega bien después.</text:p>
      <text:p text:style-name="P13">▸ <text:s/>game_risk_index: alta teoría con baja precisión. La firma exacta de una apertura que estudias pero no entiendes.</text:p>
      <text:h text:style-name="P16" text:outline-level="2">Qué señalar en la diapositiva</text:h>
      <text:p text:style-name="P12">📌 <text:s/>Slide 3: diagrama del pipeline de datos (API → Stockfish → CSV). Señala el flujo con el cursor.</text:p>
      <text:p text:style-name="P12">📌 <text:s/>Slide 4: tabla de las 3 features derivadas con su fórmula simplificada.</text:p>
      <text:p text:style-name="Standard"/>
      <text:p text:style-name="P9">── BLOQUE 3 · SELECCIÓN DEL MODELO DE ML ──</text:p>
      <text:p text:style-name="P10">⏱ <text:s/>~3:00 – 5:00 <text:s/>| <text:s/>Diapositivas 5-6</text:p>
      <text:h text:style-name="P17" text:outline-level="1">3. Por qué K-Means y qué descarté antes de llegar a él</text:h>
      <text:h text:style-name="P16" text:outline-level="2">El punto de partida: no hay etiquetas</text:h>
      <text:p text:style-name="P11">El primer dilema fue fundamental. ¿Supervisado o no supervisado? No tenía etiquetas. Nadie me iba a decir 'esta apertura de este jugador está en nivel Dominio'. Eso descartó inmediatamente toda la familia de algoritmos supervisados.</text:p>
      <text:h text:style-name="P16" text:outline-level="2">Modelos descartados y por qué</text:h>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7">Modelo descartado</text:p>
          </table:table-cell>
          <table:table-cell table:style-name="Tabla2.A1" office:value-type="string">
            <text:p text:style-name="P7">Motivo de descarte</text:p>
          </table:table-cell>
          <table:table-cell table:style-name="Tabla2.A1" office:value-type="string">
            <text:p text:style-name="P7">Limitación clave</text:p>
          </table:table-cell>
        </table:table-row>
        <table:table-row table:style-name="Tabla2.1">
          <table:table-cell table:style-name="Tabla2.A2" office:value-type="string">
            <text:p text:style-name="P8">Random Forest / XGBoost</text:p>
          </table:table-cell>
          <table:table-cell table:style-name="Tabla2.A2" office:value-type="string">
            <text:p text:style-name="P8">Supervisados: requieren etiquetas ground-truth que no existen</text:p>
          </table:table-cell>
          <table:table-cell table:style-name="Tabla2.A2" office:value-type="string">
            <text:p text:style-name="P8">No hay 'nivel real' de apertura conocido a priori</text:p>
          </table:table-cell>
        </table:table-row>
        <table:table-row table:style-name="Tabla2.1">
          <table:table-cell table:style-name="Tabla2.A3" office:value-type="string">
            <text:p text:style-name="P8">DBSCAN</text:p>
          </table:table-cell>
          <table:table-cell table:style-name="Tabla2.A3" office:value-type="string">
            <text:p text:style-name="P8">Sensible a epsilon y min_samples, muy difícil de calibrar para este dominio</text:p>
          </table:table-cell>
          <table:table-cell table:style-name="Tabla2.A3" office:value-type="string">
            <text:p text:style-name="P8">Generaba clusters de tamaños muy dispares (1 a 400 partidas)</text:p>
          </table:table-cell>
        </table:table-row>
        <table:table-row table:style-name="Tabla2.1">
          <table:table-cell table:style-name="Tabla2.A2" office:value-type="string">
            <text:p text:style-name="P8">Clustering Jerárquico</text:p>
          </table:table-cell>
          <table:table-cell table:style-name="Tabla2.A2" office:value-type="string">
            <text:p text:style-name="P8">No escalable a miles de registros; dendrograma ilegible con datos reales</text:p>
          </table:table-cell>
          <table:table-cell table:style-name="Tabla2.A2" office:value-type="string">
            <text:p text:style-name="P8">Coste O(n²): inviable para un catálogo creciente</text:p>
          </table:table-cell>
        </table:table-row>
        <table:table-row table:style-name="Tabla2.1">
          <table:table-cell table:style-name="Tabla2.A3" office:value-type="string">
            <text:p text:style-name="P8">GMM (Gaussian Mixture)</text:p>
          </table:table-cell>
          <table:table-cell table:style-name="Tabla2.A3" office:value-type="string">
            <text:p text:style-name="P8">Asume distribuciones gaussianas; ACL y precisión no las siguen</text:p>
          </table:table-cell>
          <table:table-cell table:style-name="Tabla2.A3" office:value-type="string">
            <text:p text:style-name="P8">Clusters poco estables entre ejecuciones; centroides sin interpretación clara</text:p>
          </table:table-cell>
        </table:table-row>
        <table:table-row table:style-name="Tabla2.1">
          <table:table-cell table:style-name="Tabla2.A2" office:value-type="string">
            <text:p text:style-name="P8">Filtrado colaborativo</text:p>
          </table:table-cell>
          <table:table-cell table:style-name="Tabla2.A2" office:value-type="string">
            <text:p text:style-name="P8">Para el recomendador: requiere matriz usuario-ítem con interacciones</text:p>
          </table:table-cell>
          <table:table-cell table:style-name="Tabla2.A2" office:value-type="string">
            <text:p text:style-name="P8">No tenemos historial de qué recursos estudió cada usuario</text:p>
          </table:table-cell>
        </table:table-row>
      </table:table>
      <text:p text:style-name="P2"/>
      <text:h text:style-name="P16" text:outline-level="2">Por qué K-Means (K=3)</text:h>
      <text:p text:style-name="P11">K-Means ganó por tres razones que se alinean perfectamente con el dominio del ajedrez:</text:p>
      <text:p text:style-name="P13">✓ <text:s/>Interpretabilidad total: los tres centroides corresponden exactamente a la taxonomía natural del jugador — 'dominio', 'desarrollo' y 'sin base'.</text:p>
      <text:p text:style-name="P13">✓ <text:s/>Eficiencia: con n_init=20 y k-means++ evitamos mínimos locales. Entrenamiento en milisegundos, predicción instantánea en producción.</text:p>
      <text:p text:style-name="P13">✓ <text:s/>El Método del Codo y el Silhouette Score coinciden en K=3. Silhouette de 0.48, que es robusto para datos de comportamiento humano.</text:p>
      <text:p text:style-name="P11">Un detalle importante: el clustering se hace sobre las features derivadas, no sobre ACL bruto. Esto evita que jugadores que tienen pocas partidas pero muy precisas sean clasificados como 'expertos' cuando en realidad son 'naturales' que juegan bien por instinto, no por preparación.</text:p>
      <text:h text:style-name="P16" text:outline-level="2">Qué señalar en la diapositiva</text:h>
      <text:p text:style-name="P12">📌 <text:s/>Slide 5: tabla de modelos descartados. La lees en diagonal: 'Consideré estos, aquí está por qué no'.</text:p>
      <text:p text:style-name="P12">📌 <text:s/>Slide 6: gráfico del método del codo + tabla de los 3 clusters con sus medias de ACL y teoría.</text:p>
      <text:p text:style-name="Standard"/>
      <text:p text:style-name="P9">── BLOQUE 4 · SISTEMA DE RECOMENDACIÓN ──</text:p>
      <text:p text:style-name="P10">⏱ <text:s/>~5:00 – 6:00 <text:s/>| <text:s/>Diapositiva 7</text:p>
      <text:h text:style-name="P17" text:outline-level="1">4. El recomendador: de la clasificación al plan de estudio</text:h>
      <text:h text:style-name="P16" text:outline-level="2">Lo que dices</text:h>
      <text:p text:style-name="P11">Clasificar está bien. Pero el valor real del proyecto viene después: convertir esa clasificación en un plan de estudio concreto. Aquí entró el segundo sistema, el recomendador.</text:p>
      <text:p text:style-name="P11">Construí un catálogo de 1400 recursos —libros, cursos de Chessable, vídeos de YouTube, PDFs— cada uno etiquetado con la apertura que cubre, el rango de Elo al que va dirigido y si es gratuito o de pago.</text:p>
      <text:p text:style-name="P11">El motor de recomendación hace tres cosas en orden. Primero, matching semántico: normalizo el nombre de la apertura con un diccionario de sinónimos para que 'Ruy Lopez' y 'Spanish Game' sean la misma cosa. Segundo, filtrado por rating: solo sugiero material del nivel adecuado al Elo real del usuario. Tercero, scoring ponderado: 60 puntos si la apertura aparece en el campo 'openings' del recurso, 20 si aparece en el título, más un bonus por tipo de contenido para garantizar diversidad.</text:p>
      <text:p text:style-name="P11">Y si el catálogo no tiene nada para una apertura concreta —lo que pasa con líneas muy minoritarias— el sistema hace un fallback automático a Lichess Studies, buscando estudios públicos por nombre de apertura.</text:p>
      <text:p text:style-name="P11">El resultado final se presenta en dos columnas para cada apertura: material gratuito a la izquierda, material de pago a la derecha. Ni uno excluye al otro.</text:p>
      <text:p text:style-name="P12">📌 <text:s/>Slide 7: diagrama del pipeline del recomendador. Señala el fallback a Lichess Studies como diferenciador.</text:p>
      <text:p text:style-name="Standard"/>
      <text:p text:style-name="P9">── BLOQUE 5 · DEMO EN VIVO — STREAMLIT ──</text:p>
      <text:p text:style-name="P10">⏱ <text:s/>~6:00 – 10:00 <text:s/>| <text:s/>App real</text:p>
      <text:h text:style-name="P17" text:outline-level="1">5. Demo: así funciona en la práctica</text:h>
      <text:h text:style-name="P16" text:outline-level="2">Antes de abrir la app — lo que dices</text:h>
      <text:p text:style-name="P11">Ahora os voy a mostrar la aplicación en vivo. Todo lo que veis es funcional: descarga partidas reales de Lichess, analiza con Stockfish y genera el plan en tiempo real.</text:p>
      <text:p text:style-name="P11">Voy a usar un perfil que ya tengo analizado para que la demo sea fluida y no tengamos que esperar al motor. Pero el flujo completo, incluyendo la descarga y el análisis, funciona exactamente igual para cualquier usuario de Lichess.</text:p>
      <text:h text:style-name="P16" text:outline-level="2">Guión de la demo (sigue este orden exacto)</text:h>
      <text:p text:style-name="P14">PASO 1 — Panel de configuración (30 seg)</text:p>
      <text:p text:style-name="P13">▸ <text:s/>Introduce el usuario de Lichess. Explica el token de API (seguridad, no se almacena).</text:p>
      <text:p text:style-name="P13">▸ <text:s/>Pon 100 partidas como máximo. Menciona que en producción se pueden ampliar.</text:p>
      <text:p text:style-name="P13">▸ <text:s/>Pulsa 'Analizar repertorio'. Si tienes cargado el perfil en sesión, aparecerá instantáneo.</text:p>
      <text:p text:style-name="P14">PASO 2 — Tab Dashboard (1 min)</text:p>
      <text:p text:style-name="P13">▸ <text:s/>Señala las 4 métricas de cabecera: Elo, Precisión media, Teoría media, Win rate.</text:p>
      <text:p text:style-name="P13">▸ <text:s/>Muestra la tarjeta 'Diagnóstico del Profesor'. Léela en voz alta, es el resumen del perfil.</text:p>
      <text:p text:style-name="P13">▸ <text:s/>Señala las tres columnas: Riesgo (en rojo), Dominio (en verde), Feeling Natural (en morado).</text:p>
      <text:p text:style-name="P12">📌 <text:s/>Frase clave: 'Esta columna es el insight más valioso: aperturas que juegas bien sin saber teoría. Son tu ventaja competitiva natural.'</text:p>
      <text:p text:style-name="P14">PASO 3 — Tab Plan de Estudio (1 min 30 seg)</text:p>
      <text:p text:style-name="P13">▸ <text:s/>Muestra la columna de Blancas primero. Señala la primera apertura en rojo (sin_base).</text:p>
      <text:p text:style-name="P13">▸ <text:s/>Despliega los recursos: 'Aquí veis las dos columnas — gratuito a la izquierda, de pago a la derecha.'</text:p>
      <text:p text:style-name="P13">▸ <text:s/>Señala un recurso de YouTube y uno de Amazon para mostrar la diversidad de tipos.</text:p>
      <text:p text:style-name="P13">▸ <text:s/>Si aparece un Lichess Study en el fallback, menciónalo: 'Y si el catálogo no tiene nada, busca estudios públicos en Lichess automáticamente.'</text:p>
      <text:p text:style-name="P14">PASO 4 — Tab Blunders (1 min)</text:p>
      <text:p text:style-name="P13">▸ <text:s/>Muestra la lista de blunders con sus pérdidas en centipeones.</text:p>
      <text:p text:style-name="P13">▸ <text:s/>Explica el badge verde 'enviado' si los hay: 'Ya subí estos al estudio de Lichess, pero puedo re-subirlos si lo borré.'</text:p>
      <text:p text:style-name="P13">▸ <text:s/>Si hay pendientes, pulsa 'Subir al estudio' y muestra cómo aparece en Lichess.</text:p>
      <text:p text:style-name="P12">📌 <text:s/>Frase clave: 'Cada blunder es una posición que puedo analizar en el tablero interactivo de Lichess. El error más grave de cada partida, ordenado por severidad.'</text:p>
      <text:p text:style-name="Standard"/>
      <text:p text:style-name="P9">── BLOQUE 6 · CONCLUSIONES Y FUTURO ──</text:p>
      <text:p text:style-name="P10">⏱ <text:s/>~10:00 – 11:00 <text:s/>| <text:s/>Diapositiva 8</text:p>
      <text:h text:style-name="P17" text:outline-level="1">6. Conclusiones: lo que aprendí y hacia dónde va esto</text:h>
      <text:h text:style-name="P16" text:outline-level="2">Lo que dices</text:h>
      <text:p text:style-name="P11">Quiero cerrar con tres reflexiones que van más allá del ajedrez.</text:p>
      <text:p text:style-name="P11">La primera: el valor del dato no supervisado. En muchos problemas reales no existen etiquetas. K-Means me enseñó que un buen diseño de features —las tres variables derivadas— puede hacer que un algoritmo simple produzca insights que un humano experto reconoce como válidos. Eso es lo que buscamos: que el modelo descubra algo que el experto del dominio considera obvio en retrospectiva, pero que sin datos era imposible cuantificar.</text:p>
      <text:p text:style-name="P11">La segunda: la diferencia entre un modelo y un producto. El clustering por sí solo es un paper. Conectarlo con un recomendador, con Stockfish, con la API de Lichess y presentarlo en Streamlit es lo que convierte el análisis en algo que un jugador real puede usar mañana.</text:p>
      <text:p text:style-name="P11">Y la tercera: las limitaciones honestas. El sistema necesita al menos dos partidas por apertura para clasificar. La ventana de análisis son 12 jugadas propias, no cubre el medio juego tardío. Y el catálogo de 250 recursos es una buena base, pero líneas muy minoritarias tienen cobertura limitada. Todo esto son las próximas iteraciones.</text:p>
      <text:h text:style-name="P16" text:outline-level="2">Futuro (si preguntan)</text:h>
      <text:p text:style-name="P13">✓ <text:s/>Análisis de variantes específicas dentro de cada apertura (Najdorf vs Dragon en la Siciliana).</text:p>
      <text:p text:style-name="P13">✓ <text:s/>Modelo predictivo supervisado: predicción de victoria en función de apertura + perfil.</text:p>
      <text:p text:style-name="P13">✓ <text:s/>Benchmark comparativo contra jugadores del mismo rango de rating.</text:p>
      <text:p text:style-name="P13">✓ <text:s/>Expansión a Chess.com y análisis multi-plataforma.</text:p>
      <text:p text:style-name="P12">📌 <text:s/>Slide 8: tres conclusiones + roadmap visual. Cierra con la frase de impacto.</text:p>
      <text:p text:style-name="P1"><text:span text:style-name="T1">FRASE DE CIERRE: </text:span><text:span text:style-name="T2">"El ajedrez tiene 500 años de teoría. Los datos tienen 500 millones de partidas online. Por primera vez podemos cruzar ambas cosas a nivel individual. Eso es lo que he construido."</text:span></text:p>
      <text:p text:style-name="Standard"/>
      <text:p text:style-name="P9">── BLOQUE 7 · PREGUNTAS FRECUENTES Y RESPUESTAS ──</text:p>
      <text:p text:style-name="P10">⏱ <text:s/>~11:00 – 12:00</text:p>
      <text:h text:style-name="P17" text:outline-level="1">7. Si te preguntan esto, responde así</text:h>
      <text:h text:style-name="P16" text:outline-level="2">¿Por qué no usaste una red neuronal?</text:h>
      <text:p text:style-name="P11">Porque el problema no lo justifica. Con 200-500 partidas por usuario, una red neuronal no tiene suficientes datos para aprender representaciones útiles. K-Means es mucho más robusto con conjuntos pequeños y los resultados son 100% interpretables. Si tuviéramos cientos de miles de usuarios analizados simultáneamente, un enfoque neuronal como Leela Chess Zero para embeddings de posición podría añadir valor real.</text:p>
      <text:h text:style-name="P16" text:outline-level="2">¿El Silhouette Score de 0.48 es bueno?</text:h>
      <text:p text:style-name="P11">Para datos de comportamiento humano, sí. Los valores por encima de 0.5 son excelentes, 0.48 es muy sólido. El comportamiento de un jugador de ajedrez tiene mucho ruido inherente — el resultado de una partida depende del rival, del tiempo disponible, del día — así que clusters perfectamente separados no son realistas ni deseable.</text:p>
      <text:h text:style-name="P16" text:outline-level="2">¿Cómo validas que el clustering tiene sentido?</text:h>
      <text:p text:style-name="P11">Con validación de dominio experto: jugadores reales reconocen en los tres grupos exactamente las categorías que intuitivamente usarían para describir su propio repertorio. Además, los centroides tienen gradientes claros y monótonos en todas las features: el cluster 0 siempre tiene el menor ACL y más teoría, el cluster 2 el mayor ACL y menos teoría.</text:p>
      <text:h text:style-name="P16" text:outline-level="2">¿Qué pasa con aperturas muy raras que no están en el catálogo?</text:h>
      <text:p text:style-name="P11">Dos mecanismos de fallback. Primero, el diccionario de sinónimos cubre 40 aperturas y sus variantes. Segundo, si el catálogo no tiene nada, el sistema hace una búsqueda automática en Lichess Studies y devuelve estudios públicos relacionados. El usuario siempre recibe algo útil.</text:p>
      <text:h text:style-name="P16" text:outline-level="2">¿Por qué Lichess y no Chess.com?</text:h>
      <text:p text:style-name="P11">Dos razones. La API de Lichess es completamente abierta, documentada y sin límites agresivos de rate. Chess.com requiere autenticación OAuth y tiene límites más restrictivos. Técnicamente la arquitectura soportaría Chess.com como segunda fuente, está en el roadmap de la siguiente versión.</text:p>
      <text:h text:style-name="P16" text:outline-level="2">¿Cuánto tarda el análisis de 100 partidas?</text:h>
      <text:p text:style-name="P11">Depende del hardware donde corra Stockfish. En un portátil estándar con depth 16, entre 3 y 8 minutos para 100 partidas. El cuello de botella es Stockfish, no el resto del pipeline. En servidor con Stockfish multiproceso el tiempo se reduciría un 70-80%.</text:p>
      <text:p text:style-name="Standard"/>
      <text:p text:style-name="P9">── REFERENCIA RÁPIDA — NÚMEROS QUE DEBES DOMINAR ──</text:p>
      <text:h text:style-name="P17" text:outline-level="1">8. Datos y cifras que tienes que saber de memoria</text:h>
      <table:table table:name="Tabla3" table:style-name="Tabla3">
        <table:table-column table:style-name="Tabla3.A"/>
        <table:table-column table:style-name="Tabla3.B"/>
        <table:table-row table:style-name="Tabla3.1">
          <table:table-cell table:style-name="Tabla3.A1" office:value-type="string">
            <text:p text:style-name="P7">Métrica</text:p>
          </table:table-cell>
          <table:table-cell table:style-name="Tabla3.A1" office:value-type="string">
            <text:p text:style-name="P7">Valor / explicación</text:p>
          </table:table-cell>
        </table:table-row>
        <table:table-row table:style-name="Tabla3.1">
          <table:table-cell table:style-name="Tabla3.A2" office:value-type="string">
            <text:p text:style-name="P8">Posiciones EPD en teoría_db</text:p>
          </table:table-cell>
          <table:table-cell table:style-name="Tabla3.A2" office:value-type="string">
            <text:p text:style-name="P8">327.000 posiciones de aperturas principales</text:p>
          </table:table-cell>
        </table:table-row>
        <table:table-row table:style-name="Tabla3.1">
          <table:table-cell table:style-name="Tabla3.A3" office:value-type="string">
            <text:p text:style-name="P8">Recursos en el catálogo</text:p>
          </table:table-cell>
          <table:table-cell table:style-name="Tabla3.A3" office:value-type="string">
            <text:p text:style-name="P8">250+ (YouTube, Amazon, Chessable, PDFs)</text:p>
          </table:table-cell>
        </table:table-row>
        <table:table-row table:style-name="Tabla3.1">
          <table:table-cell table:style-name="Tabla3.A2" office:value-type="string">
            <text:p text:style-name="P8">Jugadas de teoría analizadas</text:p>
          </table:table-cell>
          <table:table-cell table:style-name="Tabla3.A2" office:value-type="string">
            <text:p text:style-name="P8">Máximo 15 por partida</text:p>
          </table:table-cell>
        </table:table-row>
        <table:table-row table:style-name="Tabla3.1">
          <table:table-cell table:style-name="Tabla3.A3" office:value-type="string">
            <text:p text:style-name="P8">Jugadas post-teoría analizadas</text:p>
          </table:table-cell>
          <table:table-cell table:style-name="Tabla3.A3" office:value-type="string">
            <text:p text:style-name="P8">12 jugadas propias del jugador (ventana Stockfish)</text:p>
          </table:table-cell>
        </table:table-row>
        <table:table-row table:style-name="Tabla3.1">
          <table:table-cell table:style-name="Tabla3.A2" office:value-type="string">
            <text:p text:style-name="P8">K del clustering</text:p>
          </table:table-cell>
          <table:table-cell table:style-name="Tabla3.A2" office:value-type="string">
            <text:p text:style-name="P8">K=3 (Dominio · Desarrollo · Sin Base)</text:p>
          </table:table-cell>
        </table:table-row>
        <table:table-row table:style-name="Tabla3.1">
          <table:table-cell table:style-name="Tabla3.A3" office:value-type="string">
            <text:p text:style-name="P8">Silhouette Score</text:p>
          </table:table-cell>
          <table:table-cell table:style-name="Tabla3.A3" office:value-type="string">
            <text:p text:style-name="P8">0.48 — robusto para comportamiento humano</text:p>
          </table:table-cell>
        </table:table-row>
        <table:table-row table:style-name="Tabla3.1">
          <table:table-cell table:style-name="Tabla3.A2" office:value-type="string">
            <text:p text:style-name="P8">Fórmula de Accuracy</text:p>
          </table:table-cell>
          <table:table-cell table:style-name="Tabla3.A2" office:value-type="string">
            <text:p text:style-name="P8">100 × exp(−0.0035 × ACL)</text:p>
          </table:table-cell>
        </table:table-row>
        <table:table-row table:style-name="Tabla3.1">
          <table:table-cell table:style-name="Tabla3.A3" office:value-type="string">
            <text:p text:style-name="P8">Umbral de blunder</text:p>
          </table:table-cell>
          <table:table-cell table:style-name="Tabla3.A3" office:value-type="string">
            <text:p text:style-name="P8">&gt;100 centipeones de pérdida en una jugada</text:p>
          </table:table-cell>
        </table:table-row>
        <table:table-row table:style-name="Tabla3.1">
          <table:table-cell table:style-name="Tabla3.A2" office:value-type="string">
            <text:p text:style-name="P8">Profundidad Stockfish</text:p>
          </table:table-cell>
          <table:table-cell table:style-name="Tabla3.A2" office:value-type="string">
            <text:p text:style-name="P8">depth=16 (balance calidad/velocidad)</text:p>
          </table:table-cell>
        </table:table-row>
        <table:table-row table:style-name="Tabla3.1">
          <table:table-cell table:style-name="Tabla3.A3" office:value-type="string">
            <text:p text:style-name="P8">Mínimo de partidas para clasificar</text:p>
          </table:table-cell>
          <table:table-cell table:style-name="Tabla3.A3" office:value-type="string">
            <text:p text:style-name="P8">2 partidas por apertura</text:p>
          </table:table-cell>
        </table:table-row>
        <table:table-row table:style-name="Tabla3.1">
          <table:table-cell table:style-name="Tabla3.A2" office:value-type="string">
            <text:p text:style-name="P8">n_init en K-Means</text:p>
          </table:table-cell>
          <table:table-cell table:style-name="Tabla3.A2" office:value-type="string">
            <text:p text:style-name="P8">20 (evita mínimos locales)</text:p>
          </table:table-cell>
        </table:table-row>
        <table:table-row table:style-name="Tabla3.1">
          <table:table-cell table:style-name="Tabla3.A3" office:value-type="string">
            <text:p text:style-name="P8">Modelos descartados</text:p>
          </table:table-cell>
          <table:table-cell table:style-name="Tabla3.A3" office:value-type="string">
            <text:p text:style-name="P8">Random Forest, XGBoost, DBSCAN, Jerárquico, GMM</text:p>
          </table:table-cell>
        </table:table-row>
      </table:table>
      <text:p text:style-name="P15">Suerte, Eneko. El proyecto es sólido — cuéntalo con confianz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ES"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default-outline-level="" style:list-style-name=""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paragraph-properties fo:margin-top="0.529cm" fo:margin-bottom="0.212cm"/>
      <style:text-properties fo:color="#1e40af" style:font-name="Arial1" fo:font-size="14pt" fo:font-weight="bold" style:font-name-asian="Arial2" style:font-size-asian="14pt" style:font-weight-asian="bold" style:font-name-complex="Arial2"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141cm"/>
      <style:text-properties fo:color="#475569" style:font-name="Arial1" fo:font-size="12pt" fo:font-weight="bold" style:font-name-asian="Arial2" style:font-size-asian="12pt" style:font-weight-asian="bold" style:font-name-complex="Arial2"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fo:color="#1f4d78" fo:font-size="12pt" style:font-size-asian="12pt" style:font-size-complex="12pt"/>
    </style:style>
    <style:style style:name="Heading_20_4" style:display-name="Heading 4" style:family="paragraph" style:parent-style-name="Heading" style:next-style-name="Text_20_body" style:default-outline-level="4" style:list-style-name="" style:class="text">
      <style:text-properties fo:color="#2e74b5" fo:font-style="italic" style:font-style-asian="italic" style:font-style-complex="italic"/>
    </style:style>
    <style:style style:name="Heading_20_5" style:display-name="Heading 5" style:family="paragraph" style:parent-style-name="Heading" style:next-style-name="Text_20_body" style:default-outline-level="5" style:list-style-name="" style:class="text">
      <style:text-properties fo:color="#2e74b5"/>
    </style:style>
    <style:style style:name="Heading_20_6" style:display-name="Heading 6" style:family="paragraph" style:parent-style-name="Heading" style:next-style-name="Text_20_body" style:default-outline-level="6" style:list-style-name="" style:class="text">
      <style:text-properties fo:color="#1f4d78"/>
    </style:style>
    <style:style style:name="Strong_20_Emphasis" style:display-name="Strong Emphasis" style:family="paragraph" style:default-outline-level="" style:list-style-name="">
      <style:text-properties fo:font-weight="bold" style:font-weight-asian="bold" style:font-weight-complex="bold"/>
    </style:style>
    <style:style style:name="List_20_Paragraph" style:display-name="List Paragraph" style:family="paragraph" style:default-outline-level="" style:list-style-name=""/>
    <style:style style:name="footnote_20_text" style:display-name="footnote text" style:family="paragraph" style:default-outline-level="" style:list-style-name="">
      <style:paragraph-properties fo:margin-top="0cm" fo:margin-bottom="0cm" fo:line-height="100%"/>
      <style:text-properties fo:font-size="10pt" style:font-size-asian="10pt" style:font-size-complex="10pt"/>
    </style:style>
    <style:style style:name="endnote_20_text" style:display-name="endnote text" style:family="paragraph" style:default-outline-level="" style:list-style-name="">
      <style:paragraph-properties fo:margin-top="0cm" fo:margin-bottom="0cm" fo:line-height="10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563c1"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reference" style:display-name="endnote reference" style:family="text">
      <style:text-properties style:text-position="super 58%"/>
    </style:style>
    <style:style style:name="Endnote_20_Text_20_Char" style:display-name="Endnote Text Char" style:family="text">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1.905cm" fo:margin-left="2.223cm" fo:margin-right="1.90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n-named</meta:initial-creator>
    <meta:editing-cycles>2</meta:editing-cycles>
    <meta:creation-date>2026-05-11T18:22:40.70</meta:creation-date>
    <dc:date>2026-05-11T21:32:50.40</dc:date>
    <meta:generator>OpenOffice/4.1.16$Win32 OpenOffice.org_project/4116m3$Build-9816</meta:generator>
    <meta:document-statistic meta:table-count="3" meta:image-count="0" meta:object-count="0" meta:page-count="9" meta:paragraph-count="182" meta:word-count="2390" meta:character-count="14486"/>
    <meta:editing-duration>PT40S</meta:editing-duration>
  </office:meta>
</office:document-meta>
</file>