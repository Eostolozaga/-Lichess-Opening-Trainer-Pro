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E6000004E6B8DB1C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4cm" fo:margin-left="-0.191cm" fo:margin-top="0cm" fo:margin-bottom="0cm" table:align="left" style:writing-mode="lr-tb"/>
    </style:style>
    <style:style style:name="Tabla1.A" style:family="table-column">
      <style:table-column-properties style:column-width="5.0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4f81bd"/>
    </style:style>
    <style:style style:name="Tabla2" style:family="table">
      <style:table-properties style:width="15.24cm" fo:margin-left="-0.191cm" fo:margin-top="0cm" fo:margin-bottom="0cm" table:align="left" style:writing-mode="lr-tb"/>
    </style:style>
    <style:style style:name="Tabla2.A" style:family="table-column">
      <style:table-column-properties style:column-width="3.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4f81bd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font-size="9pt" style:font-size-asian="9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fo:font-size="40pt" style:font-size-asian="40pt" style:font-size-complex="40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cm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CHESS OPENING TRAINER PRO</text:p>
      <text:p text:style-name="P7">Análisis Inteligente de Repertorio de Aperturas</text:p>
      <text:p text:style-name="P6"/>
      <text:p text:style-name="P7">Memoria del Proyecto Final</text:p>
      <text:p text:style-name="P6"><draw:frame draw:style-name="fr1" draw:name="gráficos1" text:anchor-type="paragraph" svg:x="0.771cm" svg:y="-0.106cm" svg:width="13.28cm" svg:height="9.659cm" draw:z-index="0"><draw:image xlink:href="Pictures/10000000000004E6000004E6B8DB1CA3.jpg" xlink:type="simple" xlink:show="embed" xlink:actuate="onLoad"/></draw:frame><text:tab/></text:p>
      <text:p text:style-name="P7">Autor: Eneko Ostolozaga</text:p>
      <text:p text:style-name="P7">Bootcamp: Data Science e IA Generativa</text:p>
      <text:p text:style-name="P7">2026</text:p>
      <text:list xml:id="list4928796947377777183" text:style-name="Outline">
        <text:list-header>
          <text:p text:style-name="P9">I. Introducción</text:p>
          <text:list>
            <text:list-item>
              <text:h text:style-name="Heading_20_2" text:outline-level="2">1.1. Contexto del Problema</text:h>
            </text:list-item>
          </text:list>
        </text:list-header>
      </text:list>
      <text:p text:style-name="Standard">El ajedrez competitivo en plataformas online como Lichess genera millones de partidas diarias. Sin embargo, la mayoría de jugadores carece de herramientas que analicen sistemáticamente su repertorio de aperturas y les orienten sobre qué estudiar basándose en datos objetivos.</text:p>
      <text:p text:style-name="Standard">Los problemas identificados son:</text:p>
      <text:p text:style-name="List_20_Bullet">Falta de diagnóstico personalizado del conocimiento teórico real del jugador</text:p>
      <text:p text:style-name="List_20_Bullet">Desconocimiento de qué aperturas dominan (dominio) versus cuáles necesitan estudio urgente (riesgo)</text:p>
      <text:p text:style-name="List_20_Bullet">Ausencia de recomendaciones de estudio alineadas con su nivel y perfil de juego</text:p>
      <text:list xml:id="list43318129" text:continue-numbering="true" text:style-name="Outline">
        <text:list-item>
          <text:list>
            <text:list-item>
              <text:h text:style-name="Heading_20_2" text:outline-level="2">1.2. Objetivos del Proyecto</text:h>
            </text:list-item>
          </text:list>
        </text:list-item>
      </text:list>
      <text:p text:style-name="Standard">Objetivo principal: Desarrollar un sistema de Machine Learning que categorice automáticamente el nivel de dominio de cada apertura del repertorio del usuario y genere un plan de estudio personalizado con recursos específicos.</text:p>
      <text:p text:style-name="Standard">Objetivos específicos:</text:p>
      <text:p text:style-name="List_20_Bullet">Integrar la API de Lichess para descarga automática de partidas del usuario</text:p>
      <text:p text:style-name="List_20_Bullet">Implementar análisis con Stockfish para medir precisión post-apertura (ventana de 12 jugadas)</text:p>
      <text:p text:style-name="List_20_Bullet">Construir una base de datos teórica de 327,000 posiciones de aperturas conocidas</text:p>
      <text:p text:style-name="List_20_Bullet">Aplicar clustering K-Means (K=3) para clasificar aperturas en: Dominio, Desarrollo, Sin Base</text:p>
      <text:p text:style-name="List_20_Bullet">Desarrollar un sistema de recomendación de recursos de estudio adaptado al nivel (Rating + Accuracy)</text:p>
      <text:p text:style-name="List_20_Bullet">Implementar detección automática de blunders (errores &gt;100cp) para estudio táctico</text:p>
      <text:list xml:id="list43310346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list xml:id="list43331070" text:continue-numbering="true" text:style-name="Outline">
        <text:list-header>
          <text:p text:style-name="P9">II. Dataset</text:p>
          <text:list text:continue-numbering="true">
            <text:list-item>
              <text:h text:style-name="Heading_20_2" text:outline-level="2">2.1. Fuentes de Datos</text:h>
              <text:list>
                <text:list-item>
                  <text:h text:style-name="Heading_20_3" text:outline-level="3">2.1.1. API de Lichess</text:h>
                </text:list-item>
              </text:list>
            </text:list-item>
          </text:list>
        </text:list-header>
      </text:list>
      <text:p text:style-name="Standard">Endpoint utilizado: /api/games/user/{username}. Proporciona partidas en formato PGN con metadatos como Rating, Color, Resultado y nombre de la Apertura.</text:p>
      <text:list xml:id="list43316184" text:continue-numbering="true" text:style-name="Outline">
        <text:list-item>
          <text:list>
            <text:list-item>
              <text:list>
                <text:list-item>
                  <text:h text:style-name="Heading_20_3" text:outline-level="3">2.1.2. Base de Datos Teórica (theory_db.pkl)</text:h>
                </text:list-item>
              </text:list>
            </text:list-item>
          </text:list>
        </text:list-item>
      </text:list>
      <text:p text:style-name="Standard">Contiene 327,000 posiciones EPD de aperturas principales extraídas de libros teóricos y bases de datos maestras. Permite identificar con precisión hasta qué jugada el usuario sigue la teoría establecida.</text:p>
      <text:list xml:id="list43313750" text:continue-numbering="true" text:style-name="Outline">
        <text:list-item>
          <text:list>
            <text:list-item>
              <text:list>
                <text:list-item>
                  <text:h text:style-name="Heading_20_3" text:outline-level="3">2.1.3. Catálogo de Recursos de Estudio (chess_resources_v3.csv)</text:h>
                </text:list-item>
              </text:list>
            </text:list-item>
          </text:list>
        </text:list-item>
      </text:list>
      <text:p text:style-name="Standard">Base de datos de 1,472 recursos (cursos, libros, videos) con metadatos de apertura, nivel (principiante/intermedio/experto), rating mínimo/máximo y URL. Alimenta el sistema de recomendación.</text:p>
      <text:p text:style-name="Standard">Fuentes de obtención del catálogo:</text:p>
      <text:p text:style-name="Standard"><text:span text:style-name="T1">a) Scraping de YouTube: </text:span>Se extrajeron 800+ videos mediante la API de YouTube Data v3, filtrando por keywords relacionadas con aperturas específicas (ej: "Sicilian Defense course", "French Defense masterclass"). Se capturaron metadatos como número de visualizaciones, fecha de publicación, duración y descripción para clasificación automática de nivel.</text:p>
      <text:p text:style-name="Standard"><text:span text:style-name="T1">b) Scraping de canales de Telegram: </text:span>Se desarrolló un bot automatizado que monitoriza 15 canales especializados en ajedrez (ej: @ChessCourses, @ChessOpenings, @GMSecrets) mediante la API de Telethon. El proceso incluye:</text:p>
      <text:p text:style-name="List_20_Bullet">Extracción diaria de mensajes con enlaces a cursos o recursos</text:p>
      <text:p text:style-name="List_20_Bullet">Detección de patrones mediante regex para identificar aperturas mencionadas</text:p>
      <text:p text:style-name="List_20_Bullet">Validación de URLs para filtrar enlaces rotos o spam</text:p>
      <text:p text:style-name="List_20_Bullet">Etiquetado automático de nivel basado en keywords del mensaje ("beginner", "IM level", "2000+ rating")</text:p>
      <text:p text:style-name="Standard"><text:span text:style-name="T2">Resultado: </text:span>+350 recursos únicos obtenidos en 3 meses de monitorización continua.</text:p>
      <text:p text:style-name="Standard"/>
      <text:p text:style-name="Standard"><text:span text:style-name="T1">c) Chessable Integration: </text:span>Se realizó scraping dirigido de la plataforma Chessable.com para cursos de aperturas:</text:p>
      <text:p text:style-name="List_20_Bullet"><text:soft-page-break/>Extracción de metadatos del catálogo público mediante BeautifulSoup y requests</text:p>
      <text:p text:style-name="List_20_Bullet">Captura de información clave: título, autor, rating sugerido, precio, número de variantes incluidas</text:p>
      <text:p text:style-name="List_20_Bullet">Mapeo de cursos a sistema de aperturas ECO (Encyclopedia of Chess Openings)</text:p>
      <text:p text:style-name="List_20_Bullet">Filtrado por cursos con &gt;1000 usuarios activos para garantizar calidad</text:p>
      <text:p text:style-name="Standard"><text:span text:style-name="T2">Resultado: </text:span>+200 cursos de Chessable indexados, incluyendo los principales MoveTrainers por apertura.</text:p>
      <text:p text:style-name="Standard"><text:span text:style-name="T1">d) Bases de datos públicas: </text:span>Lichess Study Database y Chess.com Articles (scraping autorizado vía robots.txt).</text:p>
      <text:p text:style-name="Standard">El catálogo resultante cubre el 95% de las aperturas principales en el sistema ECO (A00-E99) con un promedio de 8.3 recursos por apertura.</text:p>
      <text:list xml:id="list43325483" text:continue-numbering="true" text:style-name="Outline">
        <text:list-item>
          <text:list>
            <text:list-item>
              <text:h text:style-name="Heading_20_2" text:outline-level="2">2.2. Estructura del Dataset Final</text:h>
            </text:list-item>
          </text:list>
        </text:list-item>
      </text:list>
      <text:p text:style-name="Standard">El dataset procesado (master_game_level_ml.csv) contiene las siguientes variables clave:</text:p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8">Variable</text:p>
          </table:table-cell>
          <table:table-cell table:style-name="Tabla1.A1" office:value-type="string">
            <text:p text:style-name="P8">Tipo</text:p>
          </table:table-cell>
          <table:table-cell table:style-name="Tabla1.A1" office:value-type="string">
            <text:p text:style-name="P8">Descripción</text:p>
          </table:table-cell>
        </table:table-row>
        <table:table-row table:style-name="Tabla1.1">
          <table:table-cell table:style-name="Tabla1.A1" office:value-type="string">
            <text:p text:style-name="P8">Game_ID</text:p>
          </table:table-cell>
          <table:table-cell table:style-name="Tabla1.A1" office:value-type="string">
            <text:p text:style-name="P8">String</text:p>
          </table:table-cell>
          <table:table-cell table:style-name="Tabla1.A1" office:value-type="string">
            <text:p text:style-name="P8">Identificador único de Lichess</text:p>
          </table:table-cell>
        </table:table-row>
        <table:table-row table:style-name="Tabla1.1">
          <table:table-cell table:style-name="Tabla1.A1" office:value-type="string">
            <text:p text:style-name="P8">Usuario</text:p>
          </table:table-cell>
          <table:table-cell table:style-name="Tabla1.A1" office:value-type="string">
            <text:p text:style-name="P8">String</text:p>
          </table:table-cell>
          <table:table-cell table:style-name="Tabla1.A1" office:value-type="string">
            <text:p text:style-name="P8">Nombre del jugador</text:p>
          </table:table-cell>
        </table:table-row>
        <table:table-row table:style-name="Tabla1.1">
          <table:table-cell table:style-name="Tabla1.A1" office:value-type="string">
            <text:p text:style-name="P8">Rating_Usuario</text:p>
          </table:table-cell>
          <table:table-cell table:style-name="Tabla1.A1" office:value-type="string">
            <text:p text:style-name="P8">Integer</text:p>
          </table:table-cell>
          <table:table-cell table:style-name="Tabla1.A1" office:value-type="string">
            <text:p text:style-name="P8">Elo Blitz del usuario</text:p>
          </table:table-cell>
        </table:table-row>
        <table:table-row table:style-name="Tabla1.1">
          <table:table-cell table:style-name="Tabla1.A1" office:value-type="string">
            <text:p text:style-name="P8">Apertura</text:p>
          </table:table-cell>
          <table:table-cell table:style-name="Tabla1.A1" office:value-type="string">
            <text:p text:style-name="P8">String</text:p>
          </table:table-cell>
          <table:table-cell table:style-name="Tabla1.A1" office:value-type="string">
            <text:p text:style-name="P8">Nombre de la apertura jugada</text:p>
          </table:table-cell>
        </table:table-row>
        <table:table-row table:style-name="Tabla1.1">
          <table:table-cell table:style-name="Tabla1.A1" office:value-type="string">
            <text:p text:style-name="P8">Color</text:p>
          </table:table-cell>
          <table:table-cell table:style-name="Tabla1.A1" office:value-type="string">
            <text:p text:style-name="P8">String</text:p>
          </table:table-cell>
          <table:table-cell table:style-name="Tabla1.A1" office:value-type="string">
            <text:p text:style-name="P8">Blancas / Negras</text:p>
          </table:table-cell>
        </table:table-row>
        <table:table-row table:style-name="Tabla1.1">
          <table:table-cell table:style-name="Tabla1.A1" office:value-type="string">
            <text:p text:style-name="P8">Fin_Teoria</text:p>
          </table:table-cell>
          <table:table-cell table:style-name="Tabla1.A1" office:value-type="string">
            <text:p text:style-name="P8">Integer</text:p>
          </table:table-cell>
          <table:table-cell table:style-name="Tabla1.A1" office:value-type="string">
            <text:p text:style-name="P8">Jugada en que sale de teoría (máx. 15)</text:p>
          </table:table-cell>
        </table:table-row>
        <table:table-row table:style-name="Tabla1.1">
          <table:table-cell table:style-name="Tabla1.A1" office:value-type="string">
            <text:p text:style-name="P8">ACL_Post_Teo</text:p>
          </table:table-cell>
          <table:table-cell table:style-name="Tabla1.A1" office:value-type="string">
            <text:p text:style-name="P8">Float</text:p>
          </table:table-cell>
          <table:table-cell table:style-name="Tabla1.A1" office:value-type="string">
            <text:p text:style-name="P8">Average Centipawn Loss en 12 jugadas post-teoría</text:p>
          </table:table-cell>
        </table:table-row>
        <table:table-row table:style-name="Tabla1.1">
          <table:table-cell table:style-name="Tabla1.A1" office:value-type="string">
            <text:p text:style-name="P8">Accuracy</text:p>
          </table:table-cell>
          <table:table-cell table:style-name="Tabla1.A1" office:value-type="string">
            <text:p text:style-name="P8">Float</text:p>
          </table:table-cell>
          <table:table-cell table:style-name="Tabla1.A1" office:value-type="string">
            <text:p text:style-name="P8">Precisión % (100 * exp(-0.0035 * ACL))</text:p>
          </table:table-cell>
        </table:table-row>
        <table:table-row table:style-name="Tabla1.1">
          <table:table-cell table:style-name="Tabla1.A1" office:value-type="string">
            <text:p text:style-name="P8">Victoria</text:p>
          </table:table-cell>
          <table:table-cell table:style-name="Tabla1.A1" office:value-type="string">
            <text:p text:style-name="P8">Float</text:p>
          </table:table-cell>
          <table:table-cell table:style-name="Tabla1.A1" office:value-type="string">
            <text:p text:style-name="P8">1.0 = victoria, 0.5 = tablas, 0.0 = derrota</text:p>
          </table:table-cell>
        </table:table-row>
      </table:table>
      <text:p text:style-name="Standard"/>
      <text:list xml:id="list43310711" text:continue-numbering="true" text:style-name="Outline">
        <text:list-item>
          <text:list>
            <text:list-item>
              <text:h text:style-name="P10" text:outline-level="2">2.4. Pipeline de Obtención de Recursos de Estudio</text:h>
            </text:list-item>
          </text:list>
        </text:list-item>
      </text:list>
      <text:p text:style-name="Standard">Para construir el catálogo de 1,472 recursos se implementó un sistema ETL (Extract, Transform, Load) multi-fuente con las siguientes etapas:</text:p>
      <text:list xml:id="list43307305" text:continue-numbering="true" text:style-name="Outline">
        <text:list-item>
          <text:list>
            <text:list-item>
              <text:list>
                <text:list-item>
                  <text:h text:style-name="Heading_20_3" text:outline-level="3">2.4.1. Extracción (Extract)</text:h>
                </text:list-item>
              </text:list>
            </text:list-item>
          </text:list>
        </text:list-item>
      </text:list>
      <text:p text:style-name="P2">Telegram Bot Scraper</text:p>
      <text:p text:style-name="Standard">Desafíos resueltos:</text:p>
      <text:p text:style-name="List_20_Bullet">Rate limiting de la API: Implementación de backoff exponencial (2^n segundos entre requests)</text:p>
      <text:p text:style-name="List_20_Bullet">Detección de duplicados: Hash MD5 de URLs normalizadas</text:p>
      <text:p text:style-name="List_20_Bullet">Filtrado de spam: Blacklist de dominios sospechosos + análisis de longitud de mensaje</text:p>
      <text:p text:style-name="Standard"><text:span text:style-name="T1">Chessable Scraper</text:span></text:p>
      <text:p text:style-name="Standard">Innovaciones implementadas:</text:p>
      <text:p text:style-name="List_20_Bullet">User-Agent rotation para evitar bloqueos</text:p>
      <text:p text:style-name="List_20_Bullet">Parsing de rating sugerido desde descripciones con NLP (spaCy)</text:p>
      <text:p text:style-name="List_20_Bullet">Detección automática de aperturas mencionadas mediante matching con base ECO</text:p>
      <text:list xml:id="list43305347" text:continue-numbering="true" text:style-name="Outline">
        <text:list-item>
          <text:list>
            <text:list-item>
              <text:list>
                <text:list-item>
                  <text:h text:style-name="Heading_20_3" text:outline-level="3">2.4.2. Transformación (Transform)</text:h>
                </text:list-item>
              </text:list>
            </text:list-item>
          </text:list>
        </text:list-item>
      </text:list>
      <text:p text:style-name="P2">Limpieza y Normalización</text:p>
      <text:p text:style-name="List_20_Bullet">Eliminación de duplicados: 23% de los recursos iniciales eran duplicados entre fuentes</text:p>
      <text:p text:style-name="List_20_Bullet">Normalización de títulos: Conversión a lowercase + remoción de caracteres especiales</text:p>
      <text:p text:style-name="List_20_Bullet">Detección de aperturas: Diccionario de 150 variantes principales + fuzzy matching (fuzzywuzzy library)</text:p>
      <text:p text:style-name="List_20_Bullet">Imputación de nivel: Para recursos sin nivel explícito, clasificación automática mediante keywords</text:p>
      <text:p text:style-name="Standard"><text:span text:style-name="T1">Feature Engineering</text:span></text:p>
      <text:p text:style-name="List_20_Bullet">level_tier: Categorización en 3 niveles alineados con el clustering (Beginner/Intermediate/Expert)</text:p>
      <text:p text:style-name="List_20_Bullet">has_video, has_pgn, has_exercises: Flags booleanos para filtrado avanzado</text:p>
      <text:p text:style-name="List_20_Bullet">rating_score: Agregación de métricas de calidad (views YouTube / 1000 + Chessable users / 100)</text:p>
      <text:list xml:id="list433058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2.4.3. Carga (Load)</text:h>
                </text:list-item>
              </text:list>
            </text:list-item>
          </text:list>
        </text:list-item>
      </text:list>
      <text:p text:style-name="Standard">El catálogo consolidado se persiste en chess_resources_v3.csv con 28 columnas, incluyendo:</text:p>
      <text:p text:style-name="List_20_Bullet">Identificación: resource_id, source, title, url</text:p>
      <text:p text:style-name="List_20_Bullet">Metadatos pedagógicos: resource_type, format, course_type, openings, color, author</text:p>
      <text:p text:style-name="List_20_Bullet">Segmentación: level_min, level_max, level_tier</text:p>
      <text:p text:style-name="List_20_Bullet">Métricas de calidad: rating_score, views_yt, pub_date</text:p>
      <text:p text:style-name="List_20_Bullet">Features técnicas: has_video, has_pgn, has_exercises, has_spaced_rep</text:p>
      <text:p text:style-name="Standard"/>
      <text:p text:style-name="Standard">Validación final: El 98% de los recursos tienen al menos una apertura asociada y un rango de rating válido.</text:p>
      <text:list xml:id="list43331186" text:continue-numbering="true" text:style-name="Outline">
        <text:list-item>
          <text:list>
            <text:list-item>
              <text:h text:style-name="Heading_20_2" text:outline-level="2">2.5. Análisis Exploratorio de Datos (EDA)</text:h>
            </text:list-item>
          </text:list>
        </text:list-item>
      </text:list>
      <text:p text:style-name="Standard">El análisis exploratorio reveló patrones clave en el comportamiento de los jugadores:</text:p>
      <text:p text:style-name="List_20_Bullet">Distribución de teoría: Media de 8.5 jugadas, con un 15% de partidas saliendo antes de la jugada 5</text:p>
      <text:p text:style-name="List_20_Bullet">Correlación ACL-Rating: -0.42 (a mayor rating, menor pérdida de centipeones)</text:p>
      <text:p text:style-name="List_20_Bullet">Asimetría por color: Las Blancas presentan 2.1 jugadas más de teoría en promedio</text:p>
      <text:p text:style-name="List_20_Bullet">Outliers: 5% de partidas con ACL &gt; 500cp (eliminadas mediante winsorización)</text:p>
      <text:p text:style-name="Standard"/>
      <text:list xml:id="list43321956" text:continue-numbering="true" text:style-name="Outline">
        <text:list-header>
          <text:p text:style-name="P9">III. Preprocesamiento de los Datos</text:p>
          <text:list text:continue-numbering="true">
            <text:list-item>
              <text:h text:style-name="Heading_20_2" text:outline-level="2">3.1. Verificación de la Calidad</text:h>
            </text:list-item>
          </text:list>
        </text:list-header>
      </text:list>
      <text:p text:style-name="Standard">Se implementaron las siguientes validaciones:</text:p>
      <text:p text:style-name="List_20_Bullet">Eliminación de duplicados por Game_ID (0.3% del dataset)</text:p>
      <text:p text:style-name="List_20_Bullet">Validación de FEN (notación de posición): descarte de partidas con formato inválido</text:p>
      <text:p text:style-name="List_20_Bullet">Detección de valores nulos: &lt;0.1% en variables críticas, imputados con mediana por grupo de rating</text:p>
      <text:list xml:id="list43313561" text:continue-numbering="true" text:style-name="Outline">
        <text:list-item>
          <text:list>
            <text:list-item>
              <text:h text:style-name="Heading_20_2" text:outline-level="2">3.2. Imputaciones y Transformaciones</text:h>
              <text:list>
                <text:list-item>
                  <text:h text:style-name="Heading_20_3" text:outline-level="3">3.2.1. Winsorización de ACL</text:h>
                </text:list-item>
              </text:list>
            </text:list-item>
          </text:list>
        </text:list-item>
      </text:list>
      <text:p text:style-name="Standard">Para controlar outliers sin perder información, se aplicó clipping en el percentil 95:</text:p>
      <text:p text:style-name="P4">acl_winsorized = ACL_Post_Teo.clip(upper=500)</text:p>
      <text:list xml:id="list43332177" text:continue-numbering="true" text:style-name="Outline">
        <text:list-item>
          <text:list>
            <text:list-item>
              <text:list>
                <text:list-item>
                  <text:h text:style-name="Heading_20_3" text:outline-level="3">3.2.2. Feature Engineering</text:h>
                </text:list-item>
              </text:list>
            </text:list-item>
          </text:list>
        </text:list-item>
      </text:list>
      <text:p text:style-name="Standard">Se generaron variables derivadas clave para el clustering:</text:p>
      <text:p text:style-name="Standard"><text:span text:style-name="T1">AccAjustada: </text:span>Penaliza la precisión en partidas con poca teoría (feeling natural no debe confundirse con dominio):</text:p>
      <text:p text:style-name="P5">teoria_norm = (Fin_Teoria / 15).clip(0, 1)<text:line-break/>AccAjustada = Accuracy * (1 - 0.15 * teoria_norm)</text:p>
      <text:p text:style-name="Standard"><text:span text:style-name="T1">game_prep_score: </text:span>Mide preparación teórica efectiva:</text:p>
      <text:p text:style-name="P5">(Fin_Teoria / 15) * (Accuracy / 100)</text:p>
      <text:p text:style-name="Standard"><text:span text:style-name="T1">game_risk_index: </text:span>Identifica aperturas peligrosas (mucha teoría pero baja precisión):</text:p>
      <text:p text:style-name="P5">(Fin_Teoria / 15) * (100 - Accuracy)</text:p>
      <text:list xml:id="list43329245" text:continue-numbering="true" text:style-name="Outline">
        <text:list-item>
          <text:list>
            <text:list-item>
              <text:list>
                <text:list-item>
                  <text:h text:style-name="Heading_20_3" text:outline-level="3">3.2.3. Normalización y Escalado</text:h>
                </text:list-item>
              </text:list>
            </text:list-item>
          </text:list>
        </text:list-item>
      </text:list>
      <text:p text:style-name="Standard">Las variables para clustering se normalizaron con StandardScaler de scikit-learn, almacenando el objeto scaler en scaler_apertura_pura.pkl para consistencia en producción.</text:p>
      <text:p text:style-name="Standard"/>
      <text:list xml:id="list43325462" text:continue-numbering="true" text:style-name="Outline">
        <text:list-header>
          <text:p text:style-name="P9">IV. Modelado</text:p>
          <text:list text:continue-numbering="true">
            <text:list-item>
              <text:h text:style-name="Heading_20_2" text:outline-level="2">4.1. Enfoque No Supervisado: K-Means Clustering</text:h>
            </text:list-item>
          </text:list>
        </text:list-header>
      </text:list>
      <text:p text:style-name="Standard">Se optó por un enfoque de aprendizaje no supervisado dado que:</text:p>
      <text:p text:style-name="List_20_Bullet">No existen etiquetas ground-truth del nivel de dominio de cada apertura</text:p>
      <text:p text:style-name="List_20_Bullet">El objetivo es descubrir patrones latentes en los datos de forma agnóstica</text:p>
      <text:p text:style-name="List_20_Bullet">K-Means permite segmentación interpretable alineada con la intuición ajedrecística</text:p>
      <text:p text:style-name="Standard">Variables de entrada (escaladas):</text:p>
      <text:p text:style-name="List_20_Bullet">Fin_Teoria ,acl_winsorized,game_prep_score,game_risk_index</text:p>
      <text:list xml:id="list43312909" text:continue-numbering="true" text:style-name="Outline">
        <text:list-item>
          <text:list>
            <text:list-item>
              <text:h text:style-name="Heading_20_2" text:outline-level="2">4.2. Evaluación del Número Óptimo de Clusters</text:h>
            </text:list-item>
          </text:list>
        </text:list-item>
      </text:list>
      <text:p text:style-name="Standard">Se probaron configuraciones K=2 hasta K=6 evaluando:</text:p>
      <text:p text:style-name="List_20_Bullet">Método del codo (Elbow): La inercia se estabiliza en K=3</text:p>
      <text:p text:style-name="List_20_Bullet">Silhouette Score: Máximo en K=3 (0.48)</text:p>
      <text:p text:style-name="List_20_Bullet">Interpretabilidad: K=3 se alinea con la taxonomía ajedrecística natural (Dominio, Desarrollo, Sin Base)</text:p>
      <text:list xml:id="list43328692" text:continue-numbering="true" text:style-name="Outline">
        <text:list-item>
          <text:list>
            <text:list-item>
              <text:h text:style-name="Heading_20_2" text:outline-level="2">4.3. Entrenamiento del Modelo Final</text:h>
            </text:list-item>
          </text:list>
        </text:list-item>
      </text:list>
      <text:p text:style-name="Standard">Configuración seleccionada:</text:p>
      <text:p text:style-name="List_20_Bullet">n_clusters=3</text:p>
      <text:p text:style-name="List_20_Bullet">init='k-means++' (inicialización inteligente de centroides)</text:p>
      <text:p text:style-name="List_20_Bullet">n_init=20 (múltiples inicializaciones para evitar mínimos locales)</text:p>
      <text:p text:style-name="List_20_Bullet">random_state=42 (reproducibilidad)</text:p>
      <text:p text:style-name="Standard">El modelo entrenado se persistió en km_apertura_pura.pkl junto con su scaler.</text:p>
      <text:list xml:id="list43316431" text:continue-numbering="true" text:style-name="Outline">
        <text:list-item>
          <text:list>
            <text:list-item>
              <text:h text:style-name="Heading_20_2" text:outline-level="2">4.4. Interpretación de Clusters</text:h>
            </text:list-item>
          </text:list>
        </text:list-item>
      </text:list>
      <text:p text:style-name="Standard">Ordenación de clusters por acl_winsorized medio y asignación de etiquetas semánticas: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8">Cluster</text:p>
          </table:table-cell>
          <table:table-cell table:style-name="Tabla2.A1" office:value-type="string">
            <text:p text:style-name="P8">Etiqueta</text:p>
          </table:table-cell>
          <table:table-cell table:style-name="Tabla2.A1" office:value-type="string">
            <text:p text:style-name="P8">ACL medio</text:p>
          </table:table-cell>
          <table:table-cell table:style-name="Tabla2.A1" office:value-type="string">
            <text:p text:style-name="P8">Teoría media</text:p>
          </table:table-cell>
        </table:table-row>
        <table:table-row table:style-name="Tabla2.1">
          <table:table-cell table:style-name="Tabla2.A1" office:value-type="string">
            <text:p text:style-name="P8">0</text:p>
          </table:table-cell>
          <table:table-cell table:style-name="Tabla2.A1" office:value-type="string">
            <text:p text:style-name="P8">Dominio</text:p>
          </table:table-cell>
          <table:table-cell table:style-name="Tabla2.A1" office:value-type="string">
            <text:p text:style-name="P8">35 cp</text:p>
          </table:table-cell>
          <table:table-cell table:style-name="Tabla2.A1" office:value-type="string">
            <text:p text:style-name="P8">11.2 jugadas</text:p>
          </table:table-cell>
        </table:table-row>
        <table:table-row table:style-name="Tabla2.1">
          <table:table-cell table:style-name="Tabla2.A1" office:value-type="string">
            <text:p text:style-name="P8">1</text:p>
          </table:table-cell>
          <table:table-cell table:style-name="Tabla2.A1" office:value-type="string">
            <text:p text:style-name="P8">Desarrollo</text:p>
          </table:table-cell>
          <table:table-cell table:style-name="Tabla2.A1" office:value-type="string">
            <text:p text:style-name="P8">65 cp</text:p>
          </table:table-cell>
          <table:table-cell table:style-name="Tabla2.A1" office:value-type="string">
            <text:p text:style-name="P8">8.5 jugadas</text:p>
          </table:table-cell>
        </table:table-row>
        <table:table-row table:style-name="Tabla2.1">
          <table:table-cell table:style-name="Tabla2.A1" office:value-type="string">
            <text:p text:style-name="P8">2</text:p>
          </table:table-cell>
          <table:table-cell table:style-name="Tabla2.A1" office:value-type="string">
            <text:p text:style-name="P8">Sin Base</text:p>
          </table:table-cell>
          <table:table-cell table:style-name="Tabla2.A1" office:value-type="string">
            <text:p text:style-name="P8">110 cp</text:p>
          </table:table-cell>
          <table:table-cell table:style-name="Tabla2.A1" office:value-type="string">
            <text:p text:style-name="P8">5.8 jugadas</text:p>
          </table:table-cell>
        </table:table-row>
      </table:table>
      <text:p text:style-name="Standard"/>
      <text:list xml:id="list43323196" text:continue-numbering="true" text:style-name="Outline">
        <text:list-header>
          <text:p text:style-name="P9">V. Predicción y Resultados Finales</text:p>
          <text:list text:continue-numbering="true">
            <text:list-item>
              <text:h text:style-name="Heading_20_2" text:outline-level="2">5.1. Sistema de Recomendación de Recursos</text:h>
            </text:list-item>
          </text:list>
        </text:list-header>
      </text:list>
      <text:p text:style-name="Standard">Se desarrolló un motor de búsqueda híbrido que combina:</text:p>
      <text:list xml:id="list43314670" text:continue-numbering="true" text:style-name="Outline">
        <text:list-item>
          <text:list>
            <text:list-item>
              <text:list>
                <text:list-item>
                  <text:h text:style-name="Heading_20_3" text:outline-level="3">5.1.1. Matching Semántico</text:h>
                </text:list-item>
              </text:list>
            </text:list-item>
          </text:list>
        </text:list-item>
      </text:list>
      <text:p text:style-name="List_20_Bullet">Normalización de nombres de aperturas mediante diccionario de sinónimos (ej: 'Ruy Lopez' = 'Spanish Game')</text:p>
      <text:p text:style-name="List_20_Bullet">Detección de conflictos: descarta recursos que mencionen aperturas principales incompatibles</text:p>
      <text:list xml:id="list43326822" text:continue-numbering="true" text:style-name="Outline">
        <text:list-item>
          <text:list>
            <text:list-item>
              <text:list>
                <text:list-item>
                  <text:h text:style-name="Heading_20_3" text:outline-level="3">5.1.2. Filtrado por Rating</text:h>
                </text:list-item>
              </text:list>
            </text:list-item>
          </text:list>
        </text:list-item>
      </text:list>
      <text:p text:style-name="Standard">Los recursos incluyen campos level_min y level_max. El sistema selecciona recursos cuyo rango contenga el Elo del usuario.</text:p>
      <text:list xml:id="list43314184" text:continue-numbering="true" text:style-name="Outline">
        <text:list-item>
          <text:list>
            <text:list-item>
              <text:list>
                <text:list-item>
                  <text:h text:style-name="Heading_20_3" text:outline-level="3">5.1.3. Scoring Ponderado</text:h>
                </text:list-item>
              </text:list>
            </text:list-item>
          </text:list>
        </text:list-item>
      </text:list>
      <text:p text:style-name="P4">Score = 60 × match_apertura + 20 × match_titulo + 0.5 × rating_score</text:p>
      <text:list xml:id="list43313647" text:continue-numbering="true" text:style-name="Outline">
        <text:list-item>
          <text:list>
            <text:list-item>
              <text:list>
                <text:list-item>
                  <text:h text:style-name="Heading_20_3" text:outline-level="3">5.1.4. Fallback por Tier</text:h>
                </text:list-item>
              </text:list>
            </text:list-item>
          </text:list>
        </text:list-item>
      </text:list>
      <text:p text:style-name="Standard">Si no hay recursos del tier objetivo (Expert/Intermediate/Beginner), el sistema desciende un nivel para evitar respuestas vacías.</text:p>
      <text:list xml:id="list43315201" text:continue-numbering="true" text:style-name="Outline">
        <text:list-item>
          <text:list>
            <text:list-item>
              <text:h text:style-name="Heading_20_2" text:outline-level="2">5.2. Interfaz Web (Streamlit)</text:h>
            </text:list-item>
          </text:list>
        </text:list-item>
      </text:list>
      <text:p text:style-name="Standard">La aplicación desplegada incluye tres módulos principales:</text:p>
      <text:p text:style-name="Standard"><text:span text:style-name="T1">Dashboard: </text:span>Métricas agregadas (precisión media, teoría media, win rate) y tarjetas de aperturas categorizadas en Riesgo, Dominio y Feeling Natural</text:p>
      <text:p text:style-name="Standard"><text:span text:style-name="T1">Plan de Estudio: </text:span>Top 5 aperturas priorizadas con 3 recursos recomendados por apertura</text:p>
      <text:p text:style-name="Standard"><text:span text:style-name="T1">Blunders: </text:span>Lista de errores críticos (&gt;100cp) con opción de exportar a un estudio de Lichess para análisis táctico</text:p>
      <text:list xml:id="list43312870" text:continue-numbering="true" text:style-name="Outline">
        <text:list-header>
          <text:p text:style-name="P9">VI. Conclusiones y Futuros Pasos</text:p>
          <text:list text:continue-numbering="true">
            <text:list-item>
              <text:h text:style-name="Heading_20_2" text:outline-level="2">6.1. Fortalezas del Proyecto</text:h>
            </text:list-item>
          </text:list>
        </text:list-header>
      </text:list>
      <text:p text:style-name="List_20_Bullet">Integración end-to-end: Desde la ingesta de datos (API de Lichess) hasta la recomendación personalizada, sin intervención manual</text:p>
      <text:p text:style-name="List_20_Bullet">Robustez técnica: Análisis con Stockfish 16 (depth=16) sobre ventanas controladas de 12 jugadas post-teoría</text:p>
      <text:p text:style-name="List_20_Bullet">Escalabilidad: El modelo K-Means entrenado y su scaler se persisten en PKL, permitiendo predicciones instantáneas sin reentrenamiento</text:p>
      <text:p text:style-name="List_20_Bullet">Base teórica masiva: 327,000 posiciones EPD garantizan cobertura de todas las aperturas principales</text:p>
      <text:list xml:id="list43322778" text:continue-numbering="true" text:style-name="Outline">
        <text:list-item>
          <text:list>
            <text:list-item>
              <text:h text:style-name="Heading_20_2" text:outline-level="2">6.2. Debilidades y Limitaciones</text:h>
            </text:list-item>
          </text:list>
        </text:list-item>
      </text:list>
      <text:p text:style-name="List_20_Bullet">Dependencia de volumen: El clustering requiere n≥2 partidas por apertura. Líneas raras pueden no ser clasificadas</text:p>
      <text:p text:style-name="List_20_Bullet">Ventana fija de análisis: 12 jugadas post-teoría puede no capturar errores en medio-juego tardío</text:p>
      <text:p text:style-name="List_20_Bullet">Sesgo por color: Las Blancas tienen sistemáticamente más teoría. Se mitiga separando el análisis por color</text:p>
      <text:p text:style-name="List_20_Bullet">Catálogo de recursos: El catálogo de 1,472 recursos obtenido mediante scraping multi-fuente (YouTube, Telegram, Chessable) cubre el 95% de las aperturas principales. Sin embargo, aperturas ultra-minoritarias (Polish Opening, Owen Defense, Grob) tienen cobertura limitada (&lt;3 recursos). El scraping de Telegram requiere mantenimiento continuo debido a la volatilidad de los canales.</text:p>
      <text:list xml:id="list43336518" text:continue-numbering="true" text:style-name="Outline">
        <text:list-item>
          <text:list>
            <text:list-item>
              <text:h text:style-name="Heading_20_2" text:outline-level="2">6.3. Propuestas de Mejora Futura</text:h>
            </text:list-item>
          </text:list>
        </text:list-item>
      </text:list>
      <text:p text:style-name="P2">Corto plazo:</text:p>
      <text:p text:style-name="List_20_Bullet">Detección de variantes específicas: Expandir el análisis para distinguir líneas dentro de una apertura (ej: Najdorf vs Dragon en la Siciliana)</text:p>
      <text:p text:style-name="List_20_Bullet">Análisis temporal: Detectar evolución del jugador (¿mejora en aperturas críticas tras estudio?)</text:p>
      <text:p text:style-name="List_20_Bullet">Dashboard comparativo: Benchmark contra jugadores del mismo rango de rating</text:p>
      <text:p text:style-name="Standard"/>
      <text:p text:style-name="P2">Medio plazo:</text:p>
      <text:p text:style-name="List_20_Bullet"><text:soft-page-break/>Modelo predictivo supervisado: Entrenar un clasificador (Random Forest, XGBoost) que prediga victoria/derrota en función de apertura + perfil del usuario</text:p>
      <text:p text:style-name="List_20_Bullet">Sistema de alertas proactivas: Notificar al usuario cuando una apertura pasa de Desarrollo a Riesgo (ej: tras 3 derrotas consecutivas)</text:p>
      <text:p text:style-name="List_20_Bullet">Integración con Lichess Studies: Crear estudios automáticamente con variantes teóricas de las aperturas de riesgo</text:p>
      <text:p text:style-name="Standard"/>
      <text:p text:style-name="P2">Largo plazo:</text:p>
      <text:p text:style-name="List_20_Bullet">Análisis con redes neuronales: Utilizar modelos transformers pre-entrenados en ajedrez (ej: Leela Chess Zero) para embeddings de posiciones más ricos que el análisis centipawns de Stockfish</text:p>
      <text:p text:style-name="List_20_Bullet">Sistema multi-plataforma: Expandir a Chess.com, permitiendo análisis comparativo entre plataformas</text:p>
      <text:p text:style-name="List_20_Bullet">Monetización B2C: Modelo freemium con análisis básico gratuito (50 partidas) y premium con histórico completo + notificaciones</text:p>
      <text:p text:style-name="Standard"/>
      <text:p text:style-name="Standard"/>
      <text:p text:style-name="Standard">________________________________________________________________________________</text:p>
      <text:p text:style-name="Standard"/>
      <text:p text:style-name="P3">Eneko Ostolozaga</text:p>
      <text:p text:style-name="P1">Bootcamp Data Science e IA Generativa</text:p>
      <text:p text:style-name="P1">20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Arial1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Arial1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Arial1" fo:font-size="12pt" fo:font-weight="bold" style:font-size-asian="12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Arial1" fo:font-size="24pt" fo:letter-spacing="0.009cm" fo:font-weight="bold" style:letter-kerning="true" style:font-size-asian="24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6-05-12T23:04:46.89</dc:date>
    <meta:editing-duration>PT15M31S</meta:editing-duration>
    <meta:generator>OpenOffice/4.1.16$Win32 OpenOffice.org_project/4116m3$Build-9816</meta:generator>
    <meta:document-statistic meta:table-count="2" meta:image-count="1" meta:object-count="0" meta:page-count="11" meta:paragraph-count="219" meta:word-count="1818" meta:character-count="132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